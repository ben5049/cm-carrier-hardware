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ost-r</text:p>
          </table:table-cell>
          <table:table-cell office:value-type="string" calcext:value-type="string">
            <text:p>Pre-r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kew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4.3194" calcext:value-type="float">
            <text:p>44.3194</text:p>
          </table:table-cell>
          <table:table-cell office:value-type="float" office:value="3.2212" calcext:value-type="float">
            <text:p>3.2212</text:p>
          </table:table-cell>
          <table:table-cell table:formula="of:=SUM([.B4:.C4])" office:value-type="float" office:value="47.5406" calcext:value-type="float">
            <text:p>47.5406</text:p>
          </table:table-cell>
          <table:table-cell table:formula="of:=MAX([.D$4:.D$9])-[.C4]" office:value-type="float" office:value="44.3196" calcext:value-type="float">
            <text:p>44.3196</text:p>
          </table:table-cell>
          <table:table-cell table:formula="of:=[.E4]-[.B4]" office:value-type="float" office:value="0.000199999999999534" calcext:value-type="float">
            <text:p>0.00019999999999953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44.0708" calcext:value-type="float">
            <text:p>44.0708</text:p>
          </table:table-cell>
          <table:table-cell office:value-type="float" office:value="3.4698" calcext:value-type="float">
            <text:p>3.4698</text:p>
          </table:table-cell>
          <table:table-cell table:formula="of:=SUM([.B5:.C5])" office:value-type="float" office:value="47.5406" calcext:value-type="float">
            <text:p>47.5406</text:p>
          </table:table-cell>
          <table:table-cell table:formula="of:=MAX([.D$4:.D$9])-[.C5]" office:value-type="float" office:value="44.071" calcext:value-type="float">
            <text:p>44.071</text:p>
          </table:table-cell>
          <table:table-cell table:formula="of:=[.E5]-[.B5]" office:value-type="float" office:value="0.000200000000006639" calcext:value-type="float">
            <text:p>0.00020000000000663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3.8223" calcext:value-type="float">
            <text:p>43.8223</text:p>
          </table:table-cell>
          <table:table-cell office:value-type="float" office:value="3.7183" calcext:value-type="float">
            <text:p>3.7183</text:p>
          </table:table-cell>
          <table:table-cell table:formula="of:=SUM([.B6:.C6])" office:value-type="float" office:value="47.5406" calcext:value-type="float">
            <text:p>47.5406</text:p>
          </table:table-cell>
          <table:table-cell table:formula="of:=MAX([.D$4:.D$9])-[.C6]" office:value-type="float" office:value="43.8225" calcext:value-type="float">
            <text:p>43.8225</text:p>
          </table:table-cell>
          <table:table-cell table:formula="of:=[.E6]-[.B6]" office:value-type="float" office:value="0.000200000000006639" calcext:value-type="float">
            <text:p>0.000200000000006639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43.5116" calcext:value-type="float">
            <text:p>43.5116</text:p>
          </table:table-cell>
          <table:table-cell office:value-type="float" office:value="4.029" calcext:value-type="float">
            <text:p>4.029</text:p>
          </table:table-cell>
          <table:table-cell table:formula="of:=SUM([.B7:.C7])" office:value-type="float" office:value="47.5406" calcext:value-type="float">
            <text:p>47.5406</text:p>
          </table:table-cell>
          <table:table-cell table:formula="of:=MAX([.D$4:.D$9])-[.C7]" office:value-type="float" office:value="43.5118" calcext:value-type="float">
            <text:p>43.5118</text:p>
          </table:table-cell>
          <table:table-cell table:formula="of:=[.E7]-[.B7]" office:value-type="float" office:value="0.000200000000006639" calcext:value-type="float">
            <text:p>0.000200000000006639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3.036" calcext:value-type="float">
            <text:p>43.036</text:p>
          </table:table-cell>
          <table:table-cell office:value-type="float" office:value="4.5048" calcext:value-type="float">
            <text:p>4.5048</text:p>
          </table:table-cell>
          <table:table-cell table:formula="of:=SUM([.B8:.C8])" office:value-type="float" office:value="47.5408" calcext:value-type="float">
            <text:p>47.5408</text:p>
          </table:table-cell>
          <table:table-cell table:formula="of:=MAX([.D$4:.D$9])-[.C8]" office:value-type="float" office:value="43.036" calcext:value-type="float">
            <text:p>43.036</text:p>
          </table:table-cell>
          <table:table-cell table:formula="of:=[.E8]-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42.7582" calcext:value-type="float">
            <text:p>42.7582</text:p>
          </table:table-cell>
          <table:table-cell office:value-type="float" office:value="4.7824" calcext:value-type="float">
            <text:p>4.7824</text:p>
          </table:table-cell>
          <table:table-cell table:formula="of:=SUM([.B9:.C9])" office:value-type="float" office:value="47.5406" calcext:value-type="float">
            <text:p>47.5406</text:p>
          </table:table-cell>
          <table:table-cell table:formula="of:=MAX([.D$4:.D$9])-[.C9]" office:value-type="float" office:value="42.7584" calcext:value-type="float">
            <text:p>42.7584</text:p>
          </table:table-cell>
          <table:table-cell table:formula="of:=[.E9]-[.B9]" office:value-type="float" office:value="0.000199999999999534" calcext:value-type="float">
            <text:p>0.00019999999999953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Post-r</text:p>
          </table:table-cell>
          <table:table-cell office:value-type="string" calcext:value-type="string">
            <text:p>Pre-r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kew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6.7064" calcext:value-type="float">
            <text:p>46.7064</text:p>
          </table:table-cell>
          <table:table-cell office:value-type="float" office:value="4.7882" calcext:value-type="float">
            <text:p>4.7882</text:p>
          </table:table-cell>
          <table:table-cell table:formula="of:=SUM([.B13:.C13])" office:value-type="float" office:value="51.4946" calcext:value-type="float">
            <text:p>51.4946</text:p>
          </table:table-cell>
          <table:table-cell table:formula="of:=MAX([.D$13:.D$18])-[.C13]" office:value-type="float" office:value="46.7811" calcext:value-type="float">
            <text:p>46.7811</text:p>
          </table:table-cell>
          <table:table-cell table:formula="of:=[.E13]-[.B13]" office:value-type="float" office:value="0.0747000000000071" calcext:value-type="float">
            <text:p>0.074700000000007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48.6547" calcext:value-type="float">
            <text:p>48.6547</text:p>
          </table:table-cell>
          <table:table-cell office:value-type="float" office:value="2.9097" calcext:value-type="float">
            <text:p>2.9097</text:p>
          </table:table-cell>
          <table:table-cell table:formula="of:=SUM([.B14:.C14])" office:value-type="float" office:value="51.5644" calcext:value-type="float">
            <text:p>51.5644</text:p>
          </table:table-cell>
          <table:table-cell table:formula="of:=MAX([.D$13:.D$18])-[.C14]" office:value-type="float" office:value="48.6596" calcext:value-type="float">
            <text:p>48.6596</text:p>
          </table:table-cell>
          <table:table-cell table:formula="of:=[.E14]-[.B14]" office:value-type="float" office:value="0.00490000000000634" calcext:value-type="float">
            <text:p>0.0049000000000063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6.1052" calcext:value-type="float">
            <text:p>46.1052</text:p>
          </table:table-cell>
          <table:table-cell office:value-type="float" office:value="5.4641" calcext:value-type="float">
            <text:p>5.4641</text:p>
          </table:table-cell>
          <table:table-cell table:formula="of:=SUM([.B15:.C15])" office:value-type="float" office:value="51.5693" calcext:value-type="float">
            <text:p>51.5693</text:p>
          </table:table-cell>
          <table:table-cell table:formula="of:=MAX([.D$13:.D$18])-[.C15]" office:value-type="float" office:value="46.1052" calcext:value-type="float">
            <text:p>46.1052</text:p>
          </table:table-cell>
          <table:table-cell table:formula="of:=[.E15]-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46.9834" calcext:value-type="float">
            <text:p>46.9834</text:p>
          </table:table-cell>
          <table:table-cell office:value-type="float" office:value="4.5618" calcext:value-type="float">
            <text:p>4.5618</text:p>
          </table:table-cell>
          <table:table-cell table:formula="of:=SUM([.B16:.C16])" office:value-type="float" office:value="51.5452" calcext:value-type="float">
            <text:p>51.5452</text:p>
          </table:table-cell>
          <table:table-cell table:formula="of:=MAX([.D$13:.D$18])-[.C16]" office:value-type="float" office:value="47.0075" calcext:value-type="float">
            <text:p>47.0075</text:p>
          </table:table-cell>
          <table:table-cell table:formula="of:=[.E16]-[.B16]" office:value-type="float" office:value="0.0241000000000042" calcext:value-type="float">
            <text:p>0.0241000000000042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6.8961" calcext:value-type="float">
            <text:p>46.8961</text:p>
          </table:table-cell>
          <table:table-cell office:value-type="float" office:value="4.6096" calcext:value-type="float">
            <text:p>4.6096</text:p>
          </table:table-cell>
          <table:table-cell table:formula="of:=SUM([.B17:.C17])" office:value-type="float" office:value="51.5057" calcext:value-type="float">
            <text:p>51.5057</text:p>
          </table:table-cell>
          <table:table-cell table:formula="of:=MAX([.D$13:.D$18])-[.C17]" office:value-type="float" office:value="46.9597" calcext:value-type="float">
            <text:p>46.9597</text:p>
          </table:table-cell>
          <table:table-cell table:formula="of:=[.E17]-[.B17]" office:value-type="float" office:value="0.0636000000000081" calcext:value-type="float">
            <text:p>0.0636000000000081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48.7847" calcext:value-type="float">
            <text:p>48.7847</text:p>
          </table:table-cell>
          <table:table-cell office:value-type="float" office:value="2.7182" calcext:value-type="float">
            <text:p>2.7182</text:p>
          </table:table-cell>
          <table:table-cell table:formula="of:=SUM([.B18:.C18])" office:value-type="float" office:value="51.5029" calcext:value-type="float">
            <text:p>51.5029</text:p>
          </table:table-cell>
          <table:table-cell table:formula="of:=MAX([.D$13:.D$18])-[.C18]" office:value-type="float" office:value="48.8511" calcext:value-type="float">
            <text:p>48.8511</text:p>
          </table:table-cell>
          <table:table-cell table:formula="of:=[.E18]-[.B18]" office:value-type="float" office:value="0.0664000000000016" calcext:value-type="float">
            <text:p>0.066400000000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14:33:29.094117200</meta:creation-date>
    <dc:date>2026-04-17T16:06:40.981808400</dc:date>
    <meta:editing-duration>PT3M12S</meta:editing-duration>
    <meta:editing-cycles>1</meta:editing-cycles>
    <meta:document-statistic meta:table-count="1" meta:cell-count="84" meta:object-count="0"/>
    <meta:generator>LibreOffice/25.8.5.2$Windows_X86_64 LibreOffice_project/9c8b85f387cc00a89945a79c9e6239f32e450ac2</meta:generator>
  </office:meta>
</office:document-meta>
</file>